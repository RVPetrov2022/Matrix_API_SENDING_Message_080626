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ru" fo:country="RU" officeooo:rsid="001fa3a2" officeooo:paragraph-rsid="001fa3a2"/>
    </style:style>
    <style:style style:name="P2" style:family="paragraph" style:parent-style-name="Table_20_Contents">
      <style:text-properties officeooo:rsid="001fa3a2" officeooo:paragraph-rsid="001fa3a2"/>
    </style:style>
    <style:style style:name="P3" style:family="paragraph" style:parent-style-name="Table_20_Contents">
      <style:text-properties officeooo:paragraph-rsid="001fa3a2"/>
    </style:style>
    <style:style style:name="P4" style:family="paragraph" style:parent-style-name="Standard">
      <style:text-properties fo:language="en" fo:country="US" officeooo:rsid="001fa3a2" officeooo:paragraph-rsid="001fa3a2"/>
    </style:style>
    <style:style style:name="T1" style:family="text">
      <style:text-properties fo:language="en" fo:country="US"/>
    </style:style>
    <style:style style:name="T2" style:family="text">
      <style:text-properties officeooo:rsid="001fa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>generate_output_xlxs_ID_rooms_objects_v2.py</text:p>
          </table:table-cell>
          <table:table-cell table:style-name="Таблица1.B1" office:value-type="string">
            <text:p text:style-name="P1">«Распарсивает» файл itp_fond.csv в output.xlxs.</text:p>
            <text:p text:style-name="P1"/>
            <text:p text:style-name="P1">Первый столбец: <text:span text:style-name="T1">id_room_xxx </text:span>Комната соответствует ЖК</text:p>
            <text:p text:style-name="P1">Второй столбец: <text:span text:style-name="T1">id_object_xxx – </text:span>Номер ИТП, который входит в комнату с <text:s/><text:span text:style-name="T1">id_room_xxx </text:span>(ЖК)</text:p>
            <text:p text:style-name="P1">Третий столбец: Название ЖК</text:p>
            <text:p text:style-name="P1">Четвертый <text:s/>столбец: Адрес ИТП</text:p>
            <text:p text:style-name="P1"/>
          </table:table-cell>
        </table:table-row>
        <table:table-row>
          <table:table-cell table:style-name="Таблица1.A2" office:value-type="string">
            <text:p text:style-name="Table_20_Contents"><text:s/>matrix_logger_v9.py</text:p>
          </table:table-cell>
          <table:table-cell table:style-name="Таблица1.B2" office:value-type="string">
            <text:p text:style-name="P2">Исполняемый файл для отправки сообщений </text:p>
          </table:table-cell>
        </table:table-row>
        <table:table-row>
          <table:table-cell table:style-name="Таблица1.A2" office:value-type="string">
            <text:p text:style-name="Table_20_Contents">whatchdog.py</text:p>
          </table:table-cell>
          <table:table-cell table:style-name="Таблица1.B2" office:value-type="string">
            <text:p text:style-name="P3"><text:s/><text:span text:style-name="T2">Его мы запускаем, он запускает matrix_logger_v9.py и далее следит, чтобы основной скрипт не завис.</text:span></text:p>
            <text:p text:style-name="P2">Если более 10 минут sent_messages_history.txt не обновляется, то делаем перезагрузку скрипта <text:s/>matrix_logger_v9.py и сообщение о перезагрузке отправляем watchdog_history.txt</text:p>
            <text:p text:style-name="P3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Роман  Петров</meta:initial-creator>
    <meta:creation-date>2026-06-08T11:59:19.574585400</meta:creation-date>
    <dc:date>2026-06-08T12:06:42.605713900</dc:date>
    <dc:creator>Роман  Петров</dc:creator>
    <meta:editing-duration>PT7M23S</meta:editing-duration>
    <meta:editing-cycles>1</meta:editing-cycles>
    <meta:document-statistic meta:table-count="1" meta:image-count="0" meta:object-count="0" meta:page-count="1" meta:paragraph-count="11" meta:word-count="71" meta:character-count="628" meta:non-whitespace-character-count="561"/>
    <meta:generator>LibreOffice/25.8.5.2$Windows_X86_64 LibreOffice_project/9c8b85f387cc00a89945a79c9e6239f32e450ac2</meta:generator>
  </office:meta>
</office:document-meta>
</file>